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vertical-align="top" loext:decorative="fals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objectwithoutfill">
      <style:graphic-properties draw:stroke="dash" draw:stroke-dash="Long_20_Dash" draw:marker-end="Arrow" draw:marker-end-width="0.3cm" draw:fill="none" draw:textarea-vertical-align="middl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5cm" svg:height="5.4cm" svg:x="17.4cm" svg:y="6.2cm"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5cm" svg:height="5.4cm" svg:x="16.8cm" svg:y="6.8cm"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5cm" svg:height="5.4cm" svg:x="17.6cm" svg:y="13.2cm"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5cm" svg:height="5.4cm" svg:x="17cm" svg:y="13.8cm"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4.6cm" svg:height="5.4cm" svg:x="7.4cm" svg:y="9cm">
          <text:p text:style-name="P1"><text:span text:style-name="T1">Dispatcher</text:span></text:p>
        </draw:rect>
        <draw:rect draw:style-name="gr1" draw:text-style-name="P2" draw:layer="layout" svg:width="5cm" svg:height="5.4cm" svg:x="16.2cm" svg:y="7.4cm">
          <text:p text:style-name="P1"><text:span text:style-name="T1">Administrator</text:span></text:p>
          <text:p text:style-name="P1"><text:span text:style-name="T1">Controllers</text:span></text:p>
        </draw:rect>
        <draw:rect draw:style-name="gr1" draw:text-style-name="P2" draw:layer="layout" svg:width="5cm" svg:height="4.6cm" svg:x="10.6cm" svg:y="1.8cm">
          <text:p text:style-name="P1"><text:span text:style-name="T1">MVC Factory</text:span></text:p>
        </draw:rect>
        <draw:line draw:style-name="gr2" draw:text-style-name="P3" draw:layer="layout" svg:x1="9.2cm" svg:y1="9.2cm" svg:x2="10.8cm" svg:y2="6.6cm">
          <text:p/>
        </draw:line>
        <draw:line draw:style-name="gr3" draw:text-style-name="P3" draw:layer="layout" svg:x1="11.4cm" svg:y1="11.6cm" svg:x2="16.2cm" svg:y2="9.8cm">
          <text:p/>
        </draw:line>
        <draw:line draw:style-name="gr3" draw:text-style-name="P3" draw:layer="layout" svg:x1="11.4cm" svg:y1="12.6cm" svg:x2="16.2cm" svg:y2="15.8cm">
          <text:p/>
        </draw:line>
        <draw:line draw:style-name="gr2" draw:text-style-name="P3" draw:layer="layout" svg:x1="13.2cm" svg:y1="4cm" svg:x2="16.4cm" svg:y2="7cm">
          <text:p/>
        </draw:line>
        <draw:rect draw:style-name="gr1" draw:text-style-name="P2" draw:layer="layout" svg:width="5cm" svg:height="5.4cm" svg:x="0.4cm" svg:y="9cm">
          <text:p text:style-name="P1"><text:span text:style-name="T1">Extension</text:span></text:p>
        </draw:rect>
        <draw:line draw:style-name="gr3" draw:text-style-name="P3" draw:layer="layout" svg:x1="4.2cm" svg:y1="11.4cm" svg:x2="7.6cm" svg:y2="11.4cm">
          <text:p/>
        </draw:line>
        <draw:rect draw:style-name="gr1" draw:text-style-name="P2" draw:layer="layout" svg:width="5cm" svg:height="5.4cm" svg:x="16.4cm" svg:y="14.4cm">
          <text:p text:style-name="P1"><text:span text:style-name="T1">Site</text:span></text:p>
          <text:p text:style-name="P1"><text:span text:style-name="T1">Controllers</text:span></text:p>
        </draw:rect>
        <draw:line draw:style-name="gr2" draw:text-style-name="P3" draw:layer="layout" svg:x1="12.8cm" svg:y1="4.4cm" svg:x2="16.6cm" svg:y2="13.8cm">
          <text:p/>
        </draw:line>
        <draw:rect draw:style-name="gr1" draw:text-style-name="P2" draw:layer="layout" svg:width="5cm" svg:height="4.6cm" svg:x="3.6cm" svg:y="1.8cm">
          <text:p text:style-name="P1"><text:span text:style-name="T1">Component</text:span></text:p>
          <text:p text:style-name="P1"><text:span text:style-name="T1">Dispatcher</text:span></text:p>
          <text:p text:style-name="P1"><text:span text:style-name="T1">Factory</text:span></text:p>
        </draw:rect>
        <draw:line draw:style-name="gr2" draw:text-style-name="P3" draw:layer="layout" svg:x1="3cm" svg:y1="9cm" svg:x2="4.6cm" svg:y2="6.4cm">
          <text:p/>
        </draw:line>
        <draw:line draw:style-name="gr2" draw:text-style-name="P3" draw:layer="layout" svg:x1="6.8cm" svg:y1="6.2cm" svg:x2="8.2cm" svg:y2="9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7.7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obbie Jackson</meta:initial-creator>
    <meta:creation-date>2020-01-18T17:25:28.19</meta:creation-date>
    <dc:date>2026-06-11T18:56:46.586312000</dc:date>
    <meta:editing-duration>PT22H14M23S</meta:editing-duration>
    <meta:editing-cycles>5</meta:editing-cycles>
    <meta:generator>LibreOffice/26.2.3.2$Windows_X86_64 LibreOffice_project/70e089b17412e4cb7773e41413306b17a2328c34</meta:generator>
    <meta:document-statistic meta:object-count="41"/>
  </office:meta>
</office:document-meta>
</file>